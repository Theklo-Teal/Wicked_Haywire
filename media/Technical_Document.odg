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omfortaa Medium" svg:font-family="'Comfortaa Medium'" style:font-adornments="Regular" style:font-pitch="variable"/>
    <style:font-face style:name="Comfortaa Medium1" svg:font-family="'Comfortaa Mediu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auto-grow-height="true" draw:auto-grow-width="false" fo:min-height="1.889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 style:family="graphic" style:parent-style-name="standard">
      <style:graphic-properties draw:stroke="none" svg:stroke-color="#000000" draw:fill="none" draw:fill-color="#ffffff" draw:textarea-horizontal-align="right" draw:auto-grow-height="true" draw:auto-grow-width="false" fo:min-height="1.666cm" loext:decorative="false"/>
      <style:paragraph-properties style:writing-mode="lr-tb"/>
    </style:style>
    <style:style style:name="gr4" style:family="graphic" style:parent-style-name="standard">
      <style:graphic-properties draw:stroke="none" svg:stroke-width="0.018cm" svg:stroke-color="#000000" draw:marker-start-width="0.227cm" draw:marker-end-width="0.227cm" draw:fill="none" draw:fill-color="#ffffff" draw:opacity="100%" draw:auto-grow-height="true" draw:auto-grow-width="false" fo:min-height="1.019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4.512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7.5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1.815cm" loext:decorative="false"/>
      <style:paragraph-properties style:writing-mode="lr-tb"/>
    </style:style>
    <style:style style:name="gr8" style:family="graphic" style:parent-style-name="standard">
      <style:graphic-properties draw:stroke="none" draw:fill="none" fo:min-height="15.055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omfortaa Medium"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text-properties style:font-name="Comfortaa Medium1" fo:font-size="18pt" style:font-size-asian="18pt" style:font-size-complex="18pt"/>
    </style:style>
    <style:style style:name="P5" style:family="paragraph">
      <style:paragraph-properties fo:text-align="right"/>
    </style:style>
    <style:style style:name="P6" style:family="paragraph">
      <loext:graphic-properties draw:fill="none" draw:fill-color="#ffffff"/>
      <style:paragraph-properties fo:text-align="right"/>
      <style:text-properties fo:font-size="16pt" style:font-size-asian="16pt" style:font-size-complex="16pt"/>
    </style:style>
    <style:style style:name="P7" style:family="paragraph">
      <loext:graphic-properties draw:fill="none" draw:fill-color="#ffffff" draw:opacity="100%"/>
      <style:paragraph-properties fo:text-align="center"/>
      <style:text-properties fo:font-size="20pt" style:text-underline-style="solid" style:text-underline-width="auto" style:text-underline-color="font-color" style:font-size-asian="20pt" style:font-size-complex="20pt"/>
    </style:style>
    <style:style style:name="P8" style:family="paragraph">
      <style:paragraph-properties fo:text-align="justify"/>
    </style:style>
    <style:style style:name="P9" style:family="paragraph">
      <loext:graphic-properties draw:fill="none" draw:fill-color="#ffffff"/>
      <style:paragraph-properties fo:text-align="justify"/>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42cm" fo:margin-bottom="0.35cm" fo:line-height="100%" fo:text-indent="0cm"/>
      <style:text-properties fo:font-size="10pt" style:font-size-asian="10pt" style:font-size-complex="10pt"/>
    </style:style>
    <style:style style:name="P12" style:family="paragraph">
      <loext:graphic-properties draw:fill="none" draw:fill-color="#ffffff"/>
      <style:paragraph-properties fo:margin-left="0cm" fo:margin-right="0cm" fo:margin-top="0cm" fo:margin-bottom="0cm" fo:line-height="100%" fo:text-indent="0cm"/>
      <style:text-properties style:font-name="Comfortaa Medium1" fo:font-size="14pt" style:font-size-asian="14pt" style:font-size-complex="14pt"/>
    </style:style>
    <style:style style:name="P13" style:family="paragraph">
      <loext:graphic-properties draw:fill="none"/>
    </style:style>
    <style:style style:name="T1" style:family="text">
      <style:text-properties style:font-name="Comfortaa Medium"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T2" style:family="text">
      <style:text-properties fo:font-variant="normal" fo:text-transform="none" style:use-window-font-color="true" loext:opacity="0%" style:text-outline="false" style:text-line-through-style="none" style:text-line-through-type="none" style:font-name="Comfortaa Medium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Comfortaa Medium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style:font-name="Comfortaa Medium1" fo:font-size="18pt" style:font-name-asian="Liberation Sans1" style:font-size-asian="18pt" style:font-name-complex="Liberation Sans1" style:font-size-complex="18pt"/>
    </style:style>
    <style:style style:name="T5" style:family="text">
      <style:text-properties fo:font-size="14pt" style:font-size-asian="14pt" style:font-size-complex="14pt"/>
    </style:style>
    <style:style style:name="T6" style:family="text">
      <style:text-properties fo:font-size="20pt" style:text-underline-style="solid" style:text-underline-width="auto" style:text-underline-color="font-color" style:font-size-asian="20pt" style:font-size-complex="20pt"/>
    </style:style>
    <style:style style:name="T7" style:family="text">
      <style:text-properties fo:font-variant="normal" fo:text-transform="none" style:use-window-font-color="true" loext:opacity="0%" style:text-outline="false" style:text-line-through-style="none" style:text-line-through-type="none" style:font-name="Comfortaa Medium1"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8.572cm" svg:height="2.139cm" svg:x="1.318cm" svg:y="1.401cm">
          <draw:text-box>
            <text:p text:style-name="P1"><text:span text:style-name="T1">Wicked Haywire</text:span></text:p>
          </draw:text-box>
        </draw:frame>
        <draw:frame draw:style-name="gr2" draw:text-style-name="P4" draw:layer="layout" svg:width="9.208cm" svg:height="1.27cm" svg:x="1cm" svg:y="2.587cm">
          <draw:text-box>
            <text:p text:style-name="P3"><text:span text:style-name="T2">♦ </text:span><text:span text:style-name="T3">Technical Document </text:span><text:span text:style-name="T4">♦</text:span></text:p>
          </draw:text-box>
        </draw:frame>
        <draw:frame draw:style-name="gr3" draw:text-style-name="P6" draw:layer="layout" svg:width="10.11cm" svg:height="1.916cm" svg:x="9.89cm" svg:y="1.306cm">
          <draw:text-box>
            <text:p text:style-name="P5"><text:span text:style-name="T5">Diogo Duarte, 2026</text:span></text:p>
            <text:p text:style-name="P5"><text:span text:style-name="T5"><text:a xlink:href="https://bsky.app/profile/diogo-duarte.bsky.social" xlink:type="simple">bsky.app/profile/diogo-duarte.bsky.social</text:a></text:span></text:p>
            <text:p text:style-name="P5"><text:span text:style-name="T5"><text:a xlink:href="https://github.com/Theklo-Teal/Wicked_Haywire" xlink:type="simple">github.com/Theklo-Teal/Wicked_Haywire</text:a></text:span></text:p>
          </draw:text-box>
        </draw:frame>
        <draw:frame draw:style-name="gr4" draw:text-style-name="P7" draw:layer="layout" svg:width="18.415cm" svg:height="1.269cm" svg:x="1.318cm" svg:y="3.858cm">
          <draw:text-box>
            <text:p text:style-name="P1"><text:span text:style-name="T6">Contents</text:span></text:p>
          </draw:text-box>
        </draw:frame>
        <draw:frame draw:style-name="gr4" draw:text-style-name="P7" draw:layer="layout" svg:width="18.415cm" svg:height="1.269cm" svg:x="1.317cm" svg:y="8.938cm">
          <draw:text-box>
            <text:p text:style-name="P1"><text:span text:style-name="T6">Project Overview</text:span></text:p>
          </draw:text-box>
        </draw:frame>
        <draw:frame draw:style-name="gr5" draw:text-style-name="P9" draw:layer="layout" svg:width="18.415cm" svg:height="4.762cm" svg:x="1.318cm" svg:y="4.81cm">
          <draw:text-box>
            <text:p text:style-name="P8">Preamble</text:p>
            <text:p text:style-name="P8"/>
          </draw:text-box>
        </draw:frame>
        <draw:frame draw:style-name="gr6" draw:text-style-name="P12" draw:layer="layout" svg:width="18.415cm" svg:height="18.431cm" svg:x="1.317cm" svg:y="10.207cm">
          <draw:text-box>
            <text:p text:style-name="P10"><text:span text:style-name="T7"><text:tab/></text:span><text:span text:style-name="T7">“Wicked Haywire” is a novel digital circuit simulator, but beneath that there is spatial partitioning, a flowchart design tool, a graph network solver, with Dijkstra path finding and hierarchical graphs. Two common things in many programming problems is handling coordinate system conversions and graph theory problems. The actual simulation system is actually pretty simple and still very versatile, so a minor part in the project.</text:span></text:p>
            <text:p text:style-name="P10"><text:span text:style-name="T7"/></text:p>
            <text:p text:style-name="P11"><text:span text:style-name="T7"><text:tab/></text:span><text:span text:style-name="T7">In this application, the first step is to pick an abstract device representing a real-world electronic building block. The devices are represented by panels which might be just an image of the schematic symbol for that device, text describing the device and its state, a list of options that can be clicked to define alternate behaviors for the device, or a skeuomorphic menu of the device.</text:span></text:p>
            <text:p text:style-name="P11"><text:span text:style-name="T7"><text:tab/></text:span><text:span text:style-name="T7">Regardless, they act like panels that can be clicked for selection and dragged to displace them. They can be thought as nodes or “vertices” in a graph, where “wires” (“edges” in graph terminology) between them display their interconnection to the user. They should contain “sockets” which represent the connectors, pins or terminals in a real device. Clicking them creates a new wire, once the user clicks on a second socket of another panel, defining a new connection.</text:span></text:p>
            <text:p text:style-name="P11"><text:span text:style-name="T7"><text:tab/></text:span><text:span text:style-name="T7">I define a network as a set of graphs, where each graph contains vertices with a viable path to any other vertex of that graph. But the network can contain other isolated graphs, that have no connection. In practice this is not very useful, but is a potential situation during the graphical editing of a network, therefore must be accounted for.</text:span></text:p>
            <text:p text:style-name="P11"><text:span text:style-name="T7"><text:tab/></text:span><text:span text:style-name="T7">In graph theory, the edges can be single-ended or allow signals between two nodes in both directions. What’s called a “non-directed” graph. For this project we are producing a network of non-weighted, <text:s/>two-way connections, which is cyclic and allows for loops.</text:span></text:p>
          </draw:text-box>
        </draw:frame>
      </draw:page>
      <draw:page draw:name="page2" draw:style-name="dp1" draw:master-page-name="Default">
        <draw:frame draw:style-name="gr7" draw:text-style-name="P12" draw:layer="layout" svg:width="18.415cm" svg:height="13.451cm" svg:x="1.317cm" svg:y="9.139cm">
          <draw:text-box>
            <text:p text:style-name="P10"><text:span text:style-name="T7"><text:tab/></text:span><text:span text:style-name="T7">In digital electronics theory we usually don’t deal with feedback loops, but real-world devices, loops are fundamental for complex behavior. This is why our network system is cyclic. On the other hand real-world devices involve the management and commutation between two voltage levels, something we neglect in the simulator.</text:span></text:p>
            <text:p text:style-name="P10"><text:span text:style-name="T7"/></text:p>
            <text:p text:style-name="P10"><text:span text:style-name="T7"><text:tab/></text:span><text:span text:style-name="T7">Simulated devices act like they area all connected to a common voltage source of infinite power and follow the same numeric conventions. The links are un-weighted because we only care about how many devices are in a chain and in which direction. Nodes in the network are implemented like doubly-ended lists, each node with references to any other node it connects to and these nodes with a referenced to this given node.</text:span><text:span text:style-name="T7"><text:line-break/></text:span><text:span text:style-name="T7"><text:line-break/></text:span><text:span text:style-name="T7"><text:tab/></text:span><text:span text:style-name="T7">It’s easy to imagine devices as only having inputs and output sockets, making it simple to determinate the direction of signal propagation, but then we have to deal with digital busses, which can carry information from any kind of socket to any other kind of socket, allowing commutation of digital values and multiplexing. Given we then have bidirectional sockets allows us to also simulate non-digital device like relay commutators which is of particular educational interest.</text:span><text:span text:style-name="T7"><text:line-break/></text:span><text:span text:style-name="T7"/></text:p>
            <text:p text:style-name="P10"><text:span text:style-name="T7"><text:tab/></text:span></text:p>
          </draw:text-box>
        </draw:frame>
      </draw:page>
      <draw:page draw:name="page3" draw:style-name="dp1" draw:master-page-name="Default">
        <draw:frame draw:style-name="gr8" draw:text-style-name="P13" draw:layer="layout" svg:width="18.098cm" svg:height="15.305cm" svg:x="1.317cm" svg:y="5.762cm">
          <draw:text-box>
            <text:p><text:span text:style-name="T7">Although we’ve described the device/socket/wire combination as a graph, we don’t actually compute it as a graph. They are just visual representations for the user to be able to understand and edit the circuit. Sockets don’t even actually know what they connect to. When they emit a signal, it is integrated into a simulation state, or a matrix of signal ports. Some devices read from those ports, others write to them, but they don’t know who wrote or reads.</text:span></text:p>
            <text:p><text:span text:style-name="T7"><text:line-break/></text:span><text:span text:style-name="T7"><text:tab/></text:span><text:span text:style-name="T7">Network analysis is used instead to interpret the connections between sockets, so a proper port is addressed. The graph is the collection of sockets connected together, with sockets being endpoints for that graph. This is the main reason that a network of non-connected graphs is important, as most sockets don’t connect to all other sockets.</text:span></text:p>
            <text:p><text:span text:style-name="T7"/></text:p>
            <text:p><text:span text:style-name="T7">The sockets are connected together through “wires”. Each wire being composed of segments, each also a node in the socket-to-socket graph, but they are not endpoints. This means that path-finding computes travel cost between wires and a socket. The path-finding allows for multiple endpoints, in which case each wire’s travel cost is relative to the closest socket to them.</text:span></text:p>
            <text:p><text:span text:style-name="T7"/></text:p>
            <text:p><text:span text:style-name="T7">The segment concept is important because wire paths can be geometrically complex, but a segment is represented as just a vector and two endings. A composition of these simple segments produces the wir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omfortaa Medium" svg:font-family="'Comfortaa Medium'" style:font-adornments="Regular" style:font-pitch="variable"/>
    <style:font-face style:name="Comfortaa Medium1" svg:font-family="'Comfortaa Mediu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8T13:30:31.147148085</meta:creation-date>
    <dc:date>2026-06-28T14:30:48.106801992</dc:date>
    <meta:editing-duration>PT17M33S</meta:editing-duration>
    <meta:editing-cycles>5</meta:editing-cycles>
    <meta:generator>LibreOffice/26.2.4.2$Linux_X86_64 LibreOffice_project/620$Build-2</meta:generator>
    <meta:document-statistic meta:object-count="9"/>
  </office:meta>
</office:document-meta>
</file>